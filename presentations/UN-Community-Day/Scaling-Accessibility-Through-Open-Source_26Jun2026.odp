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cripts/>
  <office:automatic-styles>
    <style:style style:name="gr-title" style:family="graphic">
      <style:graphic-properties draw:stroke="none" draw:fill="none" draw:auto-grow-height="true" draw:auto-grow-width="false"/>
    </style:style>
    <style:style style:name="gr-body" style:family="graphic">
      <style:graphic-properties draw:stroke="none" draw:fill="none" draw:auto-grow-height="true" draw:auto-grow-width="false"/>
    </style:style>
    <style:style style:name="PTitleLarge" style:family="paragraph">
      <style:paragraph-properties fo:text-align="center" fo:margin-bottom="0.3cm"/>
      <style:text-properties fo:font-size="32pt" fo:font-weight="bold"/>
    </style:style>
    <style:style style:name="PTitle" style:family="paragraph">
      <style:text-properties fo:font-size="28pt" fo:font-weight="bold"/>
    </style:style>
    <style:style style:name="PSubtitle" style:family="paragraph">
      <style:paragraph-properties fo:margin-bottom="0.35cm"/>
      <style:text-properties fo:font-size="20pt" fo:font-style="italic"/>
    </style:style>
    <style:style style:name="PMeta" style:family="paragraph">
      <style:paragraph-properties fo:margin-bottom="0.2cm"/>
      <style:text-properties fo:font-size="16pt"/>
    </style:style>
    <style:style style:name="PH2" style:family="paragraph">
      <style:paragraph-properties fo:margin-top="0.3cm" fo:margin-bottom="0.2cm"/>
      <style:text-properties fo:font-size="22pt" fo:font-weight="bold"/>
    </style:style>
    <style:style style:name="PH3" style:family="paragraph">
      <style:paragraph-properties fo:margin-top="0.2cm" fo:margin-bottom="0.15cm"/>
      <style:text-properties fo:font-size="19pt" fo:font-weight="bold"/>
    </style:style>
    <style:style style:name="PBody" style:family="paragraph">
      <style:paragraph-properties fo:margin-bottom="0.22cm"/>
      <style:text-properties fo:font-size="18pt"/>
    </style:style>
  </office:automatic-styles>
  <office:body>
    <office:presentation>
      <presentation:settings presentation:show="true" presentation:pause="PT0S"/>
      <draw:page draw:name="page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Large">Scaling Accessibility Through Open Source</text:p>
          </draw:text-box>
        </draw:frame>
        <draw:frame draw:style-name="gr-body" presentation:class="outline" svg:x="1cm" svg:y="4.2cm" svg:width="26cm" svg:height="10.55cm">
          <draw:text-box>
            <text:p text:style-name="PMeta">Date: 2026-06-26</text:p>
            <text:p text:style-name="PMeta">Location: NYC</text:p>
            <text:p text:style-name="PMeta">Speakers: Mike Gifford</text:p>
          </draw:text-box>
        </draw:frame>
      </draw:page>
      <draw:page draw:name="page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How I got into Accessibility</text:p>
          </draw:text-box>
        </draw:frame>
        <draw:frame draw:style-name="gr-body" presentation:class="outline" svg:x="1cm" svg:y="4.2cm" svg:width="26cm" svg:height="10.55cm">
          <draw:text-box>
            <text:p text:style-name="PBody">• 2009 - shifting from NGO to government</text:p>
            <text:p text:style-name="PBody">• "Drupal cares about open standards, how hard could it be?"</text:p>
            <text:p text:style-name="PBody">• I found a bug in Drupal 6, got it fixed in Drupal 7</text:p>
            <text:p text:style-name="PBody">• I shifted 2-3% of the web &amp; improved the experience for millions!</text:p>
            <text:p text:style-name="PBody">• Scale can become a bit addictive</text:p>
          </draw:text-box>
        </draw:frame>
      </draw:page>
      <draw:page draw:name="page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Open source runs everything</text:p>
          </draw:text-box>
        </draw:frame>
        <draw:frame draw:style-name="gr-body" presentation:class="outline" svg:x="1cm" svg:y="4.2cm" svg:width="26cm" svg:height="10.55cm">
          <draw:text-box>
            <text:p text:style-name="PBody">• 97% of the codebases Black Duck evaluated contain open source</text:p>
            <text:p text:style-name="PBody">• Developers are Lazy (ok, we're all lazy) - Defaults matter</text:p>
            <text:p text:style-name="PBody">• Accessibility issues are bugs (not feature requests)</text:p>
            <text:p text:style-name="PBody">• Fixing a bug upstream has a huge multiplier (often millions of times)</text:p>
            <text:p text:style-name="PBody">• Shift Left (upstream)</text:p>
          </draw:text-box>
        </draw:frame>
      </draw:page>
      <draw:page draw:name="page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Culture Eats Policy for Breakfast</text:p>
          </draw:text-box>
        </draw:frame>
        <draw:frame draw:style-name="gr-body" presentation:class="outline" svg:x="1cm" svg:y="4.2cm" svg:width="26cm" svg:height="10.55cm">
          <draw:text-box>
            <text:p text:style-name="PBody">• It is bigger than the code, it is about being inclusive as a community</text:p>
            <text:p text:style-name="PBody">• Seeing people with disabilities as people with expertise</text:p>
            <text:p text:style-name="PBody">• People creating technology are creating our future</text:p>
            <text:p text:style-name="PBody">• Disability a critical part of the human condition</text:p>
          </draw:text-box>
        </draw:frame>
      </draw:page>
      <draw:page draw:name="page5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Early and Often</text:p>
          </draw:text-box>
        </draw:frame>
        <draw:frame draw:style-name="gr-body" presentation:class="outline" svg:x="1cm" svg:y="4.2cm" svg:width="26cm" svg:height="10.55cm">
          <draw:text-box>
            <text:p text:style-name="PBody">• Integrate accessibility training into your onboarding</text:p>
            <text:p text:style-name="PBody">• Build it into your CI/CD processes</text:p>
            <text:p text:style-name="PBody">• Ensure you have people with disabilities on your team</text:p>
            <text:p text:style-name="PBody">• Have an ACCESSIBILITY.md or similar skill (I've built one if you want)</text:p>
          </draw:text-box>
        </draw:frame>
      </draw:page>
      <draw:page draw:name="page6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Resources and follow-up</text:p>
          </draw:text-box>
        </draw:frame>
        <draw:frame draw:style-name="gr-body" presentation:class="outline" svg:x="1cm" svg:y="4.2cm" svg:width="26cm" svg:height="10.55cm">
          <draw:text-box>
            <text:p text:style-name="PBody">• https://accessibilityinsights.io</text:p>
            <text:p text:style-name="PBody">• https://www.oobee.tech.gov.sg</text:p>
            <text:p text:style-name="PBody">• https://github.com/mgifford/pdf-crawler</text:p>
            <text:p text:style-name="PBody">• https://github.com/mgifford/open-scans</text:p>
            <text:p text:style-name="PBody">• https://github.com/mgifford/vital-core</text:p>
          </draw:text-box>
        </draw:frame>
      </draw:page>
      <draw:page draw:name="page7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Questions?</text:p>
          </draw:text-box>
        </draw:frame>
        <draw:frame draw:style-name="gr-body" presentation:class="outline" svg:x="1cm" svg:y="4.2cm" svg:width="26cm" svg:height="10.55cm">
          <draw:text-box>
            <text:p text:style-name="PSubtitle">Thanks for following along. Here is how to keep the conversation going.</text:p>
            <text:p text:style-name="PMeta">Website: example.com/slides</text:p>
            <text:p text:style-name="PMeta">Social: Mastodon @example; Bluesky @example.com</text:p>
            <text:p text:style-name="PMeta">Slides: example.com/slides/demo-deck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tyles>
    <style:default-style style:family="graphic">
      <style:graphic-properties draw:stroke="none" draw:fill="none"/>
    </style:default-style>
    <style:default-style style:family="paragraph">
      <style:paragraph-properties fo:margin-top="0cm" fo:margin-bottom="0.2cm"/>
      <style:text-properties fo:font-size="16pt"/>
    </style:default-style>
    <style:style style:name="dp1" style:family="drawing-page">
      <style:drawing-page-properties presentation:background-visible="true" presentation:background-objects-visible="true"/>
    </style:style>
  </office:styles>
  <office:automatic-styles>
    <style:page-layout style:name="PM1">
      <style:page-layout-properties fo:page-width="28cm" fo:page-height="15.75cm" style:print-orientation="landscape" presentation:display-header="false" presentation:display-footer="false" presentation:display-page-number="false" presentation:display-date-time="false"/>
    </style:page-layout>
    <style:presentation-page-layout style:name="AL1T0">
      <presentation:placeholder presentation:object="title" svg:x="1cm" svg:y="0.9cm" svg:width="26cm" svg:height="2.8cm"/>
      <presentation:placeholder presentation:object="outline" svg:x="1cm" svg:y="4.2cm" svg:width="26cm" svg:height="10.55cm"/>
    </style:presentation-page-layout>
  </office:automatic-styles>
  <office:master-styles>
    <style:master-page style:name="Default" style:page-layout-name="PM1" draw:style-name="dp1" presentation:presentation-page-layout-name="AL1T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>
    <dc:title>Scaling Accessibility Through Open Source</dc:title>
    <meta:generator>Markdown Slides Editor</meta:generator>
  </office:meta>
</office:document-meta>
</file>