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cripts/>
  <office:automatic-styles>
    <style:style style:name="gr-title" style:family="graphic">
      <style:graphic-properties draw:stroke="none" draw:fill="none" draw:auto-grow-height="true" draw:auto-grow-width="false"/>
    </style:style>
    <style:style style:name="gr-body" style:family="graphic">
      <style:graphic-properties draw:stroke="none" draw:fill="none" draw:auto-grow-height="true" draw:auto-grow-width="false"/>
    </style:style>
    <style:style style:name="PTitleLarge" style:family="paragraph">
      <style:paragraph-properties fo:text-align="center" fo:margin-bottom="0.3cm"/>
      <style:text-properties fo:font-size="32pt" fo:font-weight="bold"/>
    </style:style>
    <style:style style:name="PTitle" style:family="paragraph">
      <style:text-properties fo:font-size="28pt" fo:font-weight="bold"/>
    </style:style>
    <style:style style:name="PSubtitle" style:family="paragraph">
      <style:paragraph-properties fo:margin-bottom="0.35cm"/>
      <style:text-properties fo:font-size="20pt" fo:font-style="italic"/>
    </style:style>
    <style:style style:name="PMeta" style:family="paragraph">
      <style:paragraph-properties fo:margin-bottom="0.2cm"/>
      <style:text-properties fo:font-size="16pt"/>
    </style:style>
    <style:style style:name="PH2" style:family="paragraph">
      <style:paragraph-properties fo:margin-top="0.3cm" fo:margin-bottom="0.2cm"/>
      <style:text-properties fo:font-size="22pt" fo:font-weight="bold"/>
    </style:style>
    <style:style style:name="PH3" style:family="paragraph">
      <style:paragraph-properties fo:margin-top="0.2cm" fo:margin-bottom="0.15cm"/>
      <style:text-properties fo:font-size="19pt" fo:font-weight="bold"/>
    </style:style>
    <style:style style:name="PBody" style:family="paragraph">
      <style:paragraph-properties fo:margin-bottom="0.22cm"/>
      <style:text-properties fo:font-size="18pt"/>
    </style:style>
  </office:automatic-styles>
  <office:body>
    <office:presentation>
      <presentation:settings presentation:show="true" presentation:pause="PT0S"/>
      <draw:page draw:name="page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Large">Scaling SDGs through Local Open Source Procurement</text:p>
          </draw:text-box>
        </draw:frame>
        <draw:frame draw:style-name="gr-body" presentation:class="outline" svg:x="1cm" svg:y="4.2cm" svg:width="26cm" svg:height="10.55cm">
          <draw:text-box>
            <text:p text:style-name="PSubtitle">Procurement How can the public sector leverage procurement to grow national and local capabilities and vendor ecosystems? What’s missing?</text:p>
            <text:p text:style-name="PMeta">Date: 2026-06-26</text:p>
            <text:p text:style-name="PMeta">Location: UNHQ, NYC</text:p>
            <text:p text:style-name="PMeta">Speakers: Mike Gifford</text:p>
          </draw:text-box>
        </draw:frame>
      </draw:page>
      <draw:page draw:name="page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Procurement Matters</text:p>
          </draw:text-box>
        </draw:frame>
        <draw:frame draw:style-name="gr-body" presentation:class="outline" svg:x="1cm" svg:y="4.2cm" svg:width="26cm" svg:height="10.55cm">
          <draw:text-box>
            <text:p text:style-name="PBody">Governments are the biggest purchasers of goods &amp; services.</text:p>
            <text:p text:style-name="PBody">• Stated policies and preferences impact vendor behavior</text:p>
            <text:p text:style-name="PBody">• Procurement is a bigger leaver than grants or credits</text:p>
            <text:p text:style-name="PBody">• Contract management &amp; evaluation key to strategy</text:p>
            <text:p text:style-name="PBody">• Little understanding of digital, let alone open source</text:p>
            <text:p text:style-name="PBody">• 97% of the software Black Duck surveyed in 2025 contained open source software</text:p>
          </draw:text-box>
        </draw:frame>
      </draw:page>
      <draw:page draw:name="page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haping Incentives</text:p>
          </draw:text-box>
        </draw:frame>
        <draw:frame draw:style-name="gr-body" presentation:class="outline" svg:x="1cm" svg:y="4.2cm" svg:width="26cm" svg:height="10.55cm">
          <draw:text-box>
            <text:p text:style-name="PBody">This has worked before!</text:p>
            <text:p text:style-name="PBody">• Accessibility (Section 508) has driven vendors globally</text:p>
            <text:p text:style-name="PBody">• GDPR has likewise shifted with regard to privacy</text:p>
            <text:p text:style-name="PBody">• Self reporting (VPATS) are of limited use</text:p>
            <text:p text:style-name="PBody">• Vendor lock-in costs more than the contract</text:p>
            <text:p text:style-name="PBody">• Everyone is using open source, but few are contributing back</text:p>
          </draw:text-box>
        </draw:frame>
      </draw:page>
      <draw:page draw:name="page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Supporting Local</text:p>
          </draw:text-box>
        </draw:frame>
        <draw:frame draw:style-name="gr-body" presentation:class="outline" svg:x="1cm" svg:y="4.2cm" svg:width="26cm" svg:height="10.55cm">
          <draw:text-box>
            <text:p text:style-name="PBody">Do small/medium countries have the expertise?</text:p>
            <text:p text:style-name="PBody">• Anyone can support open source, but who will</text:p>
            <text:p text:style-name="PBody">• Typo3 model in Kenya</text:p>
            <text:p text:style-name="PBody">• Train an ecosystem of vendors and interested client</text:p>
            <text:p text:style-name="PBody">• Allow for sub-contracting to build up local experience</text:p>
            <text:p text:style-name="PBody">• Digital Services Coalition</text:p>
          </draw:text-box>
        </draw:frame>
      </draw:page>
      <draw:page draw:name="page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Readiness Engagement Ladder</text:p>
          </draw:text-box>
        </draw:frame>
        <draw:frame draw:style-name="gr-body" presentation:class="outline" svg:x="1cm" svg:y="4.2cm" svg:width="26cm" svg:height="10.55cm">
          <draw:text-box>
            <text:p text:style-name="PBody">We can incentivize firms to move up their contributions.</text:p>
            <text:p text:style-name="PBody">• Ad Hoc / Informal</text:p>
            <text:p text:style-name="PBody">• Basic Compliance &amp; Documentation</text:p>
            <text:p text:style-name="PBody">• Adopted &amp; Participating (Drupal Certified Partners)</text:p>
            <text:p text:style-name="PBody">• Advanced Stewardship</text:p>
            <text:p text:style-name="PBody">• Strategic Ecosystem Partner</text:p>
          </draw:text-box>
        </draw:frame>
      </draw:page>
      <draw:page draw:name="page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Resources and follow-up</text:p>
          </draw:text-box>
        </draw:frame>
        <draw:frame draw:style-name="gr-body" presentation:class="outline" svg:x="1cm" svg:y="4.2cm" svg:width="26cm" svg:height="10.55cm">
          <draw:text-box>
            <text:p text:style-name="PBody">• https://www.blackduck.com/resources/analyst-reports/open-source-security-risk-analysis.html</text:p>
            <text:p text:style-name="PBody">• https://new.drupal.org/association/become-a-drupal-certified-partner</text:p>
            <text:p text:style-name="PBody">• https://news.typo3.com/article/typo3-grows-strong-in-africa</text:p>
          </draw:text-box>
        </draw:frame>
      </draw:page>
      <draw:page draw:name="page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Questions?</text:p>
          </draw:text-box>
        </draw:frame>
        <draw:frame draw:style-name="gr-body" presentation:class="outline" svg:x="1cm" svg:y="4.2cm" svg:width="26cm" svg:height="10.55cm">
          <draw:text-box>
            <text:p text:style-name="PSubtitle">Thanks for following along. Here is how to keep the conversation going.</text:p>
            <text:p text:style-name="PMeta">Website: ox.ca</text:p>
            <text:p text:style-name="PMeta">Social: Bluesky @ox.ca</text:p>
            <text:p text:style-name="PMeta">Slides: ox.ca/p/9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tyles>
    <style:default-style style:family="graphic">
      <style:graphic-properties draw:stroke="none" draw:fill="none"/>
    </style:default-style>
    <style:default-style style:family="paragraph">
      <style:paragraph-properties fo:margin-top="0cm" fo:margin-bottom="0.2cm"/>
      <style:text-properties fo:font-size="16pt"/>
    </style:default-style>
    <style:style style:name="dp1" style:family="drawing-page">
      <style:drawing-page-properties presentation:background-visible="true" presentation:background-objects-visible="true"/>
    </style:style>
  </office:styles>
  <office:automatic-styles>
    <style:page-layout style:name="PM1">
      <style:page-layout-properties fo:page-width="28cm" fo:page-height="15.75cm" style:print-orientation="landscape" presentation:display-header="false" presentation:display-footer="false" presentation:display-page-number="false" presentation:display-date-time="false"/>
    </style:page-layout>
    <style:presentation-page-layout style:name="AL1T0">
      <presentation:placeholder presentation:object="title" svg:x="1cm" svg:y="0.9cm" svg:width="26cm" svg:height="2.8cm"/>
      <presentation:placeholder presentation:object="outline" svg:x="1cm" svg:y="4.2cm" svg:width="26cm" svg:height="10.55cm"/>
    </style:presentation-page-layout>
  </office:automatic-styles>
  <office:master-styles>
    <style:master-page style:name="Default" style:page-layout-name="PM1" draw:style-name="dp1" presentation:presentation-page-layout-name="AL1T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Scaling SDGs through Local Open Source Procurement</dc:title>
    <meta:generator>Markdown Slides Editor</meta:generator>
  </office:meta>
</office:document-meta>
</file>