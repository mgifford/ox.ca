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Open Source and Accessibility</text:p>
          </draw:text-box>
        </draw:frame>
        <draw:frame draw:style-name="gr-body" presentation:class="outline" svg:x="1cm" svg:y="4.2cm" svg:width="26cm" svg:height="10.55cm">
          <draw:text-box>
            <text:p text:style-name="PSubtitle">Contributing to a Common Solution</text:p>
            <text:p text:style-name="PMeta">Date: 2026-06-22</text:p>
            <text:p text:style-name="PMeta">Location: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Deque's Axe Core</text:p>
          </draw:text-box>
        </draw:frame>
        <draw:frame draw:style-name="gr-body" presentation:class="outline" svg:x="1cm" svg:y="4.2cm" svg:width="26cm" svg:height="10.55cm">
          <draw:text-box>
            <text:p text:style-name="PBody">It is the default as it has avoided false positives:</text:p>
            <text:p text:style-name="PBody">https://github.com/dequelabs/axe-cor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Microsoft's Accessibility Insights</text:p>
          </draw:text-box>
        </draw:frame>
        <draw:frame draw:style-name="gr-body" presentation:class="outline" svg:x="1cm" svg:y="4.2cm" svg:width="26cm" svg:height="10.55cm">
          <draw:text-box>
            <text:p text:style-name="PBody">Axe + Keyboard Tracking + Manual Testing</text:p>
            <text:p text:style-name="PBody">https://accessibilityinsights.io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Just a keyboard</text:p>
          </draw:text-box>
        </draw:frame>
        <draw:frame draw:style-name="gr-body" presentation:class="outline" svg:x="1cm" svg:y="4.2cm" svg:width="26cm" svg:height="10.55cm">
          <draw:text-box>
            <text:p text:style-name="PBody">It is as easy as it sounds. Try just using Tab or Shift-tab to move between your content.</text:p>
            <text:p text:style-name="PBody">https://www.a11y-collective.com/blog/keyboard-navigation/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DPG: Oobee</text:p>
          </draw:text-box>
        </draw:frame>
        <draw:frame draw:style-name="gr-body" presentation:class="outline" svg:x="1cm" svg:y="4.2cm" svg:width="26cm" svg:height="10.55cm">
          <draw:text-box>
            <text:p text:style-name="PBody">Multi-page axe scans from Government Technology Agency of Singapore (GovTech Singapore)</text:p>
            <text:p text:style-name="PBody">https://github.com/GovTechSG/oobee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CI/CD Tools</text:p>
          </draw:text-box>
        </draw:frame>
        <draw:frame draw:style-name="gr-body" presentation:class="outline" svg:x="1cm" svg:y="4.2cm" svg:width="26cm" svg:height="10.55cm">
          <draw:text-box>
            <text:p text:style-name="PBody">@axe-core/playwright is a solid start</text:p>
            <text:p text:style-name="PBody">https://www.qamadness.com/a-you-oriented-guide-to-axe-core-playwright-accessibility-testing/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AI — ACCESSIBILITY.md</text:p>
          </draw:text-box>
        </draw:frame>
        <draw:frame draw:style-name="gr-body" presentation:class="outline" svg:x="1cm" svg:y="4.2cm" svg:width="26cm" svg:height="10.55cm">
          <draw:text-box>
            <text:p text:style-name="PBody">More code is produced with AI, and it is important for us to make it clear that accessibility matters.</text:p>
            <text:p text:style-name="PBody">• https://mgifford.github.io/ACCESSIBILITY.md</text:p>
            <text:p text:style-name="PBody">• https://github.com/mgifford/accessibility-skills</text:p>
          </draw:text-box>
        </draw:frame>
      </draw:page>
      <draw:page draw:name="page8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eople with disabilities</text:p>
          </draw:text-box>
        </draw:frame>
        <draw:frame draw:style-name="gr-body" presentation:class="outline" svg:x="1cm" svg:y="4.2cm" svg:width="26cm" svg:height="10.55cm">
          <draw:text-box>
            <text:p text:style-name="PBody">Guidelines and best practices are nice, but what matters most is the users. Don't forget to involve people with disabilities in the process from the start.</text:p>
            <text:p text:style-name="PBody">https://www.section508.gov/test/usability-testing-with-people-with-disabilities/</text:p>
          </draw:text-box>
        </draw:frame>
      </draw:page>
      <draw:page draw:name="page9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ox.ca</text:p>
            <text:p text:style-name="PMeta">Social: Bluesky @ox.ca</text:p>
            <text:p text:style-name="PMeta">Slides: ox.ca/p/7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Open Source and Accessibility</dc:title>
    <meta:generator>Markdown Slides Editor</meta:generator>
  </office:meta>
</office:document-meta>
</file>