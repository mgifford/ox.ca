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Accessibility Through Open Source</text:p>
          </draw:text-box>
        </draw:frame>
        <draw:frame draw:style-name="gr-body" presentation:class="outline" svg:x="1cm" svg:y="4.2cm" svg:width="26cm" svg:height="10.55cm">
          <draw:text-box>
            <text:p text:style-name="PMeta">Date: 2026-06-26</text:p>
            <text:p text:style-name="PMeta">Location: UNHQ,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How I got into Accessibility</text:p>
          </draw:text-box>
        </draw:frame>
        <draw:frame draw:style-name="gr-body" presentation:class="outline" svg:x="1cm" svg:y="4.2cm" svg:width="26cm" svg:height="10.55cm">
          <draw:text-box>
            <text:p text:style-name="PBody">• 2009 - shifting from NGO to government</text:p>
            <text:p text:style-name="PBody">• "Drupal cares about open standards, how hard could it be?"</text:p>
            <text:p text:style-name="PBody">• I found a bug in Drupal 6, got it fixed in Drupal 7</text:p>
            <text:p text:style-name="PBody">• I shifted 2-3% of the web &amp; improved the experience for millions!</text:p>
            <text:p text:style-name="PBody">• Scale can become a bit addictiv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Open source runs everything</text:p>
          </draw:text-box>
        </draw:frame>
        <draw:frame draw:style-name="gr-body" presentation:class="outline" svg:x="1cm" svg:y="4.2cm" svg:width="26cm" svg:height="10.55cm">
          <draw:text-box>
            <text:p text:style-name="PBody">• 97% of the codebases Black Duck evaluated contain open source</text:p>
            <text:p text:style-name="PBody">• Developers are Lazy (ok, we're all lazy) - Defaults matter</text:p>
            <text:p text:style-name="PBody">• Accessibility issues are bugs (not feature requests)</text:p>
            <text:p text:style-name="PBody">• Fixing a bug upstream has a huge multiplier (often millions of times)</text:p>
            <text:p text:style-name="PBody">• Shift Left (upstream)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ulture Eats Policy for Breakfast</text:p>
          </draw:text-box>
        </draw:frame>
        <draw:frame draw:style-name="gr-body" presentation:class="outline" svg:x="1cm" svg:y="4.2cm" svg:width="26cm" svg:height="10.55cm">
          <draw:text-box>
            <text:p text:style-name="PBody">• It is bigger than the code, it is about being inclusive as a community</text:p>
            <text:p text:style-name="PBody">• Seeing people with disabilities as people with expertise</text:p>
            <text:p text:style-name="PBody">• People creating technology are creating our future</text:p>
            <text:p text:style-name="PBody">• Disability a critical part of the human cond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Early and Often</text:p>
          </draw:text-box>
        </draw:frame>
        <draw:frame draw:style-name="gr-body" presentation:class="outline" svg:x="1cm" svg:y="4.2cm" svg:width="26cm" svg:height="10.55cm">
          <draw:text-box>
            <text:p text:style-name="PBody">• Integrate accessibility training into your onboarding</text:p>
            <text:p text:style-name="PBody">• Build it into your CI/CD processes</text:p>
            <text:p text:style-name="PBody">• Ensure you have people with disabilities on your team</text:p>
            <text:p text:style-name="PBody">• Have an ACCESSIBILITY.md or similar skill (I've built one if you want)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>• https://accessibilityinsights.io</text:p>
            <text:p text:style-name="PBody">• https://www.oobee.tech.gov.sg</text:p>
            <text:p text:style-name="PBody">• https://github.com/mgifford/pdf-crawler</text:p>
            <text:p text:style-name="PBody">• https://github.com/mgifford/open-scans</text:p>
            <text:p text:style-name="PBody">• https://github.com/mgifford/vital-core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Bluesky @ox.ca</text:p>
            <text:p text:style-name="PMeta">Slides: ox.ca/p/8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Accessibility Through Open Source</dc:title>
    <meta:generator>Markdown Slides Editor</meta:generator>
  </office:meta>
</office:document-meta>
</file>