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cripts/>
  <office:automatic-styles>
    <style:style style:name="gr-title" style:family="graphic">
      <style:graphic-properties draw:stroke="none" draw:fill="none" draw:auto-grow-height="true" draw:auto-grow-width="false"/>
    </style:style>
    <style:style style:name="gr-body" style:family="graphic">
      <style:graphic-properties draw:stroke="none" draw:fill="none" draw:auto-grow-height="true" draw:auto-grow-width="false"/>
    </style:style>
    <style:style style:name="PTitleLarge" style:family="paragraph">
      <style:paragraph-properties fo:text-align="center" fo:margin-bottom="0.3cm"/>
      <style:text-properties fo:font-size="32pt" fo:font-weight="bold"/>
    </style:style>
    <style:style style:name="PTitle" style:family="paragraph">
      <style:text-properties fo:font-size="28pt" fo:font-weight="bold"/>
    </style:style>
    <style:style style:name="PSubtitle" style:family="paragraph">
      <style:paragraph-properties fo:margin-bottom="0.35cm"/>
      <style:text-properties fo:font-size="20pt" fo:font-style="italic"/>
    </style:style>
    <style:style style:name="PMeta" style:family="paragraph">
      <style:paragraph-properties fo:margin-bottom="0.2cm"/>
      <style:text-properties fo:font-size="16pt"/>
    </style:style>
    <style:style style:name="PH2" style:family="paragraph">
      <style:paragraph-properties fo:margin-top="0.3cm" fo:margin-bottom="0.2cm"/>
      <style:text-properties fo:font-size="22pt" fo:font-weight="bold"/>
    </style:style>
    <style:style style:name="PH3" style:family="paragraph">
      <style:paragraph-properties fo:margin-top="0.2cm" fo:margin-bottom="0.15cm"/>
      <style:text-properties fo:font-size="19pt" fo:font-weight="bold"/>
    </style:style>
    <style:style style:name="PBody" style:family="paragraph">
      <style:paragraph-properties fo:margin-bottom="0.22cm"/>
      <style:text-properties fo:font-size="18pt"/>
    </style:style>
  </office:automatic-styles>
  <office:body>
    <office:presentation>
      <presentation:settings presentation:show="true" presentation:pause="PT0S"/>
      <draw:page draw:name="page1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Large">AI Is Rewriting the Rules. Who Controls the Outcome?</text:p>
          </draw:text-box>
        </draw:frame>
        <draw:frame draw:style-name="gr-body" presentation:class="outline" svg:x="1cm" svg:y="4.2cm" svg:width="26cm" svg:height="10.55cm">
          <draw:text-box>
            <text:p text:style-name="PSubtitle">Open Source, DPGs &amp; the Fight for Digital Independence</text:p>
            <text:p text:style-name="PMeta">Date: 2026-05-26</text:p>
            <text:p text:style-name="PMeta">Location: FWD50 Virtual</text:p>
            <text:p text:style-name="PMeta">Speakers: Mike Gifford (CivicActions)</text:p>
          </draw:text-box>
        </draw:frame>
      </draw:page>
      <draw:page draw:name="page2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Digital Transformation Is Hard</text:p>
          </draw:text-box>
        </draw:frame>
        <draw:frame draw:style-name="gr-body" presentation:class="outline" svg:x="1cm" svg:y="4.2cm" svg:width="12.8cm" svg:height="10.55cm">
          <draw:text-box>
            <text:p text:style-name="PH2">The last 30 years of digital are now legacy</text:p>
            <text:p text:style-name="PBody">• Proprietary software was important</text:p>
            <text:p text:style-name="PBody">• It helped organize both people &amp; technology</text:p>
            <text:p text:style-name="PBody">• Sadly, it became entrenched, restrictive &amp; proprietary</text:p>
          </draw:text-box>
        </draw:frame>
        <draw:frame draw:style-name="gr-body" presentation:class="outline" svg:x="14.2cm" svg:y="4.2cm" svg:width="12.8cm" svg:height="10.55cm">
          <draw:text-box>
            <text:p text:style-name="PBody">• Open source now powers most modern software</text:p>
            <text:p text:style-name="PBody">• Europe is correctly calling open source digital infrastructure</text:p>
            <text:p text:style-name="PBody">• Today, there are solid, reliable, secure open source alternatives</text:p>
            <text:p text:style-name="PBody">[SVG diagram]</text:p>
          </draw:text-box>
        </draw:frame>
      </draw:page>
      <draw:page draw:name="page3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Building the Digital Commons</text:p>
          </draw:text-box>
        </draw:frame>
        <draw:frame draw:style-name="gr-body" presentation:class="outline" svg:x="1cm" svg:y="4.2cm" svg:width="12.8cm" svg:height="10.55cm">
          <draw:text-box>
            <text:p text:style-name="PH2">The rupture is driving strategic autonomy</text:p>
            <text:p text:style-name="PBody">• Digital Public Goods (DPG) / Digital Public Infrastructure (DPI)</text:p>
            <text:p text:style-name="PBody">• Tied to the UN's Sustainable Development Goals</text:p>
            <text:p text:style-name="PBody">• Open source / standards + security + privacy + documentation</text:p>
          </draw:text-box>
        </draw:frame>
        <draw:frame draw:style-name="gr-body" presentation:class="outline" svg:x="14.2cm" svg:y="4.2cm" svg:width="12.8cm" svg:height="10.55cm">
          <draw:text-box>
            <text:p text:style-name="PBody">• Digital is driving all governments</text:p>
            <text:p text:style-name="PBody">• Code is a national security matter</text:p>
            <text:p text:style-name="PBody">• Digital independence is now defined the ability to choose</text:p>
            <text:p text:style-name="PBody">• 3rd Annual UN Open Source Week</text:p>
            <text:p text:style-name="PBody">• Lower budgets &amp; bigger needs</text:p>
            <text:p text:style-name="PBody">[SVG diagram]</text:p>
          </draw:text-box>
        </draw:frame>
      </draw:page>
      <draw:page draw:name="page4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Proof of Concept: Europe’s Shift</text:p>
          </draw:text-box>
        </draw:frame>
        <draw:frame draw:style-name="gr-body" presentation:class="outline" svg:x="1cm" svg:y="4.2cm" svg:width="12.8cm" svg:height="10.55cm">
          <draw:text-box>
            <text:p text:style-name="PH2">Europe is truly leading the way</text:p>
            <text:p text:style-name="PBody">• Digital independence is possible</text:p>
            <text:p text:style-name="PBody">• Europe is quickly proving this</text:p>
            <text:p text:style-name="PBody">• We can choose to do more than accommodate &amp; hope</text:p>
            <text:p text:style-name="PBody">• Governments can build &amp; buy local but contribute globally</text:p>
          </draw:text-box>
        </draw:frame>
        <draw:frame draw:style-name="gr-body" presentation:class="outline" svg:x="14.2cm" svg:y="4.2cm" svg:width="12.8cm" svg:height="10.55cm">
          <draw:text-box>
            <text:p text:style-name="PBody">• The strongest alternative to America-first is global collaboration</text:p>
            <text:p text:style-name="PBody">• DPGs &amp; DPIs help focus global initiatives</text:p>
            <text:p text:style-name="PBody">• Open source investments become technical equity</text:p>
            <text:p text:style-name="PBody">[SVG diagram]</text:p>
          </draw:text-box>
        </draw:frame>
      </draw:page>
      <draw:page draw:name="page5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Most Governments are Digital Tenants</text:p>
          </draw:text-box>
        </draw:frame>
        <draw:frame draw:style-name="gr-body" presentation:class="outline" svg:x="1cm" svg:y="4.2cm" svg:width="12.8cm" svg:height="10.55cm">
          <draw:text-box>
            <text:p text:style-name="PH2">Proprietary software is now a risk</text:p>
            <text:p text:style-name="PBody">Performative Sovereignty</text:p>
            <text:p text:style-name="PBody">• Data residency is meaningless</text:p>
            <text:p text:style-name="PBody">• Corporate pledges are sales-talk</text:p>
            <text:p text:style-name="PBody">• SaaS models have become another form of vendor lock-in</text:p>
          </draw:text-box>
        </draw:frame>
        <draw:frame draw:style-name="gr-body" presentation:class="outline" svg:x="14.2cm" svg:y="4.2cm" svg:width="12.8cm" svg:height="10.55cm">
          <draw:text-box>
            <text:p text:style-name="PBody">The Harsh Reality</text:p>
            <text:p text:style-name="PBody">• Dependency: Limited audit-ability</text:p>
            <text:p text:style-name="PBody">• Laws: Parent company's laws win</text:p>
            <text:p text:style-name="PBody">• Framing: We are Digital Colonies</text:p>
            <text:p text:style-name="PBody">You must be able to inspect, improve &amp; distribute, to control digital.</text:p>
            <text:p text:style-name="PBody">[SVG diagram]</text:p>
          </draw:text-box>
        </draw:frame>
      </draw:page>
      <draw:page draw:name="page6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AI: The Sovereignty Fork</text:p>
          </draw:text-box>
        </draw:frame>
        <draw:frame draw:style-name="gr-body" presentation:class="outline" svg:x="1cm" svg:y="4.2cm" svg:width="12.8cm" svg:height="10.55cm">
          <draw:text-box>
            <text:p text:style-name="PH2">Two paths for the future of state power</text:p>
            <text:p text:style-name="PH3">Algorithmic Clientelism</text:p>
            <text:p text:style-name="PBody">• Consolidated: Total control by hegemonies</text:p>
            <text:p text:style-name="PBody">• Surrender of Authority: State dependancy on corporate End-user license agreements</text:p>
            <text:p text:style-name="PBody">• Monoculture: One-size-fits-all values &amp; logic</text:p>
          </draw:text-box>
        </draw:frame>
        <draw:frame draw:style-name="gr-body" presentation:class="outline" svg:x="14.2cm" svg:y="4.2cm" svg:width="12.8cm" svg:height="10.55cm">
          <draw:text-box>
            <text:p text:style-name="PH3">Participatory Stewardship</text:p>
            <text:p text:style-name="PBody">• Distributed: Governed by community ecosystems</text:p>
            <text:p text:style-name="PBody">• Active Authority: Governments able to co-design, fork &amp; fix the code they run</text:p>
            <text:p text:style-name="PBody">• Diverse: Models localized to jurisdictions</text:p>
            <text:p text:style-name="PBody">AI investment must shift from replacing human labor to augmenting national autonomy.</text:p>
            <text:p text:style-name="PBody">[SVG diagram]</text:p>
          </draw:text-box>
        </draw:frame>
      </draw:page>
      <draw:page draw:name="page7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The Middle Power Strategy</text:p>
          </draw:text-box>
        </draw:frame>
        <draw:frame draw:style-name="gr-body" presentation:class="outline" svg:x="1cm" svg:y="4.2cm" svg:width="12.8cm" svg:height="10.55cm">
          <draw:text-box>
            <text:p text:style-name="PH2">Participatory Sovereignty Through DPGs</text:p>
            <text:p text:style-name="PBody">• Independence is already an illusion, but we can have choice</text:p>
            <text:p text:style-name="PBody">• Middle powers gain leverage through shared code</text:p>
            <text:p text:style-name="PBody">• Mature DPGs become collective insurance</text:p>
          </draw:text-box>
        </draw:frame>
        <draw:frame draw:style-name="gr-body" presentation:class="outline" svg:x="14.2cm" svg:y="4.2cm" svg:width="12.8cm" svg:height="10.55cm">
          <draw:text-box>
            <text:p text:style-name="PBody">• Interoperability: Building on global, open DPI building blocks</text:p>
            <text:p text:style-name="PBody">• GovStack: Building a roadmap for the future / not passive consumers</text:p>
            <text:p text:style-name="PBody">• Independence: Ensuring no external entity can turn off government services</text:p>
            <text:p text:style-name="PBody">[SVG diagram]</text:p>
          </draw:text-box>
        </draw:frame>
      </draw:page>
      <draw:page draw:name="page8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overeign SLMs: "Weights as Law"</text:p>
          </draw:text-box>
        </draw:frame>
        <draw:frame draw:style-name="gr-body" presentation:class="outline" svg:x="1cm" svg:y="4.2cm" svg:width="12.8cm" svg:height="10.55cm">
          <draw:text-box>
            <text:p text:style-name="PH2">Deploying open government AI safely</text:p>
            <text:p text:style-name="PBody">• Local Deployment: Running models on sovereign, domestic &amp; renewable compute</text:p>
            <text:p text:style-name="PBody">• Context-Aware: Trained strictly on our laws, regulatory frameworks &amp; cultural context</text:p>
            <text:p text:style-name="PBody">• Regulated: Small, distributed, truely-open LLMs</text:p>
          </draw:text-box>
        </draw:frame>
        <draw:frame draw:style-name="gr-body" presentation:class="outline" svg:x="14.2cm" svg:y="4.2cm" svg:width="12.8cm" svg:height="10.55cm">
          <draw:text-box>
            <text:p text:style-name="PBody">• Open Weights/Data: With AI, code alone is insufficient to understand the model</text:p>
            <text:p text:style-name="PBody">• Predictable Outcomes: Trading generative chaos for deterministic public administration</text:p>
            <text:p text:style-name="PBody">• Controlled Costs &amp; Versions: Keeping power over critical system</text:p>
            <text:p text:style-name="PBody">[SVG diagram]</text:p>
          </draw:text-box>
        </draw:frame>
      </draw:page>
      <draw:page draw:name="page9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Procurement as Industrial Policy</text:p>
          </draw:text-box>
        </draw:frame>
        <draw:frame draw:style-name="gr-body" presentation:class="outline" svg:x="1cm" svg:y="4.2cm" svg:width="12.8cm" svg:height="10.55cm">
          <draw:text-box>
            <text:p text:style-name="PH2">Feeding the Ecosystem, Not the Hegemons</text:p>
            <text:p text:style-name="PBody">• Public Money, Public Code: If we pay for it, it should be public</text:p>
            <text:p text:style-name="PBody">• Modular Contracting: Breakup with corporate lock-in</text:p>
            <text:p text:style-name="PBody">• Shift Incentives: Encourage responsible collaboration</text:p>
            <text:p text:style-name="PBody">• Local Ecosystems : Leveraging SME innovation</text:p>
          </draw:text-box>
        </draw:frame>
        <draw:frame draw:style-name="gr-body" presentation:class="outline" svg:x="14.2cm" svg:y="4.2cm" svg:width="12.8cm" svg:height="10.55cm">
          <draw:text-box>
            <text:p text:style-name="PBody">• Open Source / Open Standards are now critical infrastructure</text:p>
            <text:p text:style-name="PBody">• Currently most governments aren't contributing</text:p>
            <text:p text:style-name="PBody">• Sovereign Tech Agencies are supporting better governance</text:p>
            <text:p text:style-name="PBody">• We aren't going to vibe-code our way to better digital government</text:p>
            <text:p text:style-name="PBody">[SVG diagram]</text:p>
          </draw:text-box>
        </draw:frame>
      </draw:page>
      <draw:page draw:name="page10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The FWD50 Call to Action</text:p>
          </draw:text-box>
        </draw:frame>
        <draw:frame draw:style-name="gr-body" presentation:class="outline" svg:x="1cm" svg:y="4.2cm" svg:width="26cm" svg:height="10.55cm">
          <draw:text-box>
            <text:p text:style-name="PH2">From Tenants to Architects</text:p>
            <text:p text:style-name="PBody">• Audit Your Stack: What can you inspect?</text:p>
            <text:p text:style-name="PBody">• Prioritize DPGs: When buying software or services, investigate if a DPG exists</text:p>
            <text:p text:style-name="PBody">• Find the Others: Are there other agencies with similar needs?</text:p>
            <text:p text:style-name="PBody">• Collaborate Globally: Governments must start to collaborate more</text:p>
            <text:p text:style-name="PBody">The future will be controlled by those that best steward digital infrastructure.</text:p>
            <text:p text:style-name="PBody">[SVG diagram]</text:p>
          </draw:text-box>
        </draw:frame>
      </draw:page>
      <draw:page draw:name="page11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Questions?</text:p>
          </draw:text-box>
        </draw:frame>
        <draw:frame draw:style-name="gr-body" presentation:class="outline" svg:x="1cm" svg:y="4.2cm" svg:width="26cm" svg:height="10.55cm">
          <draw:text-box>
            <text:p text:style-name="PSubtitle">Thanks for following along. Here is how to keep the conversation going.</text:p>
            <text:p text:style-name="PMeta">Website: ox.ca/p/6</text:p>
            <text:p text:style-name="PMeta">Social: Bluesky @ox.ca</text:p>
            <text:p text:style-name="PMeta">Slides: ox.ca/p/6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tyles>
    <style:default-style style:family="graphic">
      <style:graphic-properties draw:stroke="none" draw:fill="none"/>
    </style:default-style>
    <style:default-style style:family="paragraph">
      <style:paragraph-properties fo:margin-top="0cm" fo:margin-bottom="0.2cm"/>
      <style:text-properties fo:font-size="16pt"/>
    </style:default-style>
    <style:style style:name="dp1" style:family="drawing-page">
      <style:drawing-page-properties presentation:background-visible="true" presentation:background-objects-visible="true"/>
    </style:style>
  </office:styles>
  <office:automatic-styles>
    <style:page-layout style:name="PM1">
      <style:page-layout-properties fo:page-width="28cm" fo:page-height="15.75cm" style:print-orientation="landscape" presentation:display-header="false" presentation:display-footer="false" presentation:display-page-number="false" presentation:display-date-time="false"/>
    </style:page-layout>
    <style:presentation-page-layout style:name="AL1T0">
      <presentation:placeholder presentation:object="title" svg:x="1cm" svg:y="0.9cm" svg:width="26cm" svg:height="2.8cm"/>
      <presentation:placeholder presentation:object="outline" svg:x="1cm" svg:y="4.2cm" svg:width="26cm" svg:height="10.55cm"/>
    </style:presentation-page-layout>
  </office:automatic-styles>
  <office:master-styles>
    <style:master-page style:name="Default" style:page-layout-name="PM1" draw:style-name="dp1" presentation:presentation-page-layout-name="AL1T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2">
  <office:meta>
    <dc:title>AI Is Rewriting the Rules. Who Controls the Outcome?</dc:title>
    <meta:generator>Markdown Slides Editor</meta:generator>
  </office:meta>
</office:document-meta>
</file>