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lide 1</text:p>
          </draw:text-box>
        </draw:frame>
        <draw:frame draw:style-name="gr-body" presentation:class="outline" svg:x="1cm" svg:y="4.2cm" svg:width="26cm" svg:height="10.55cm">
          <draw:text-box>
            <text:p text:style-name="PBody">[Image: DrupalCamp Ottawa 2025]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lide 2</text:p>
          </draw:text-box>
        </draw:frame>
        <draw:frame draw:style-name="gr-body" presentation:class="outline" svg:x="1cm" svg:y="4.2cm" svg:width="26cm" svg:height="10.55cm">
          <draw:text-box>
            <text:p text:style-name="PBody">[Image: Thank Sponsors]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lide 3</text:p>
          </draw:text-box>
        </draw:frame>
        <draw:frame draw:style-name="gr-body" presentation:class="outline" svg:x="1cm" svg:y="4.2cm" svg:width="26cm" svg:height="10.55cm">
          <draw:text-box>
            <text:p text:style-name="PBody">[Image: Speaker Bio]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Code as Constitution: Building Public Digital Infrastructure We Can Actually Trust</text:p>
          </draw:text-box>
        </draw:frame>
        <draw:frame draw:style-name="gr-body" presentation:class="outline" svg:x="1cm" svg:y="4.2cm" svg:width="26cm" svg:height="10.55cm">
          <draw:text-box>
            <text:p text:style-name="PSubtitle">Drupal, AI, and the Architecture of Digital Sovereignty</text:p>
            <text:p text:style-name="PMeta">Date: 2026-05-01</text:p>
            <text:p text:style-name="PMeta">Location: DrupalCamp Ottawa, Canada</text:p>
            <text:p text:style-name="PMeta">Speakers: Mike Gifford (CivicActions)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olving More Than Is Recognized</text:p>
          </draw:text-box>
        </draw:frame>
        <draw:frame draw:style-name="gr-body" presentation:class="outline" svg:x="1cm" svg:y="4.2cm" svg:width="12.8cm" svg:height="10.55cm">
          <draw:text-box>
            <text:p text:style-name="PH2">Drupal is already playing a strong role</text:p>
            <text:p text:style-name="PBody">• Publishing at scale</text:p>
            <text:p text:style-name="PBody">• Accessibility / security</text:p>
            <text:p text:style-name="PBody">• Flexible, multilingual delivery</text:p>
            <text:p text:style-name="PBody">• Complex workflows</text:p>
          </draw:text-box>
        </draw:frame>
        <draw:frame draw:style-name="gr-body" presentation:class="outline" svg:x="14.2cm" svg:y="4.2cm" svg:width="12.8cm" svg:height="10.55cm">
          <draw:text-box>
            <text:p text:style-name="PBody">• Open source</text:p>
            <text:p text:style-name="PBody">• Vendor-neutral</text:p>
            <text:p text:style-name="PBody">• Globally maintained</text:p>
            <text:p text:style-name="PBody">• Built locally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A Stable Interface for Change</text:p>
          </draw:text-box>
        </draw:frame>
        <draw:frame draw:style-name="gr-body" presentation:class="outline" svg:x="1cm" svg:y="4.2cm" svg:width="12.8cm" svg:height="10.55cm">
          <draw:text-box>
            <text:p text:style-name="PH2">Drupal is infrastructure, bridging systems</text:p>
            <text:p text:style-name="PBody">• Learning community</text:p>
            <text:p text:style-name="PBody">• Extensive well-organized content</text:p>
            <text:p text:style-name="PBody">• Forward-looking (Remember RDFa)</text:p>
            <text:p text:style-name="PBody">• Lots of documentation &amp; examples</text:p>
          </draw:text-box>
        </draw:frame>
        <draw:frame draw:style-name="gr-body" presentation:class="outline" svg:x="14.2cm" svg:y="4.2cm" svg:width="12.8cm" svg:height="10.55cm">
          <draw:text-box>
            <text:p text:style-name="PBody">• API-first architecture</text:p>
            <text:p text:style-name="PBody">• Well-structured content</text:p>
            <text:p text:style-name="PBody">• Extensible modules</text:p>
            <text:p text:style-name="PBody">• Almost built for AI</text:p>
            <text:p text:style-name="PBody">Drupal is Brilliantly Boring!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Foundation for Independence</text:p>
          </draw:text-box>
        </draw:frame>
        <draw:frame draw:style-name="gr-body" presentation:class="outline" svg:x="1cm" svg:y="4.2cm" svg:width="12.8cm" svg:height="10.55cm">
          <draw:text-box>
            <text:p text:style-name="PH2">It isn't just about the code</text:p>
            <text:p text:style-name="PBody">• Multiple providers</text:p>
            <text:p text:style-name="PBody">• Vibrant ecosystem</text:p>
            <text:p text:style-name="PBody">• Legal consistency (GPL)</text:p>
            <text:p text:style-name="PBody">• Many hosting options</text:p>
          </draw:text-box>
        </draw:frame>
        <draw:frame draw:style-name="gr-body" presentation:class="outline" svg:x="14.2cm" svg:y="4.2cm" svg:width="12.8cm" svg:height="10.55cm">
          <draw:text-box>
            <text:p text:style-name="PBody">• Continuity &amp; workflow flexibility</text:p>
            <text:p text:style-name="PBody">• History of reduced risk</text:p>
            <text:p text:style-name="PBody">• Options to do it internally</text:p>
            <text:p text:style-name="PBody">• Reduced cost of ownership</text:p>
          </draw:text-box>
        </draw:frame>
      </draw:page>
      <draw:page draw:name="page8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What AI in Drupal Looks Like</text:p>
          </draw:text-box>
        </draw:frame>
        <draw:frame draw:style-name="gr-body" presentation:class="outline" svg:x="1cm" svg:y="4.2cm" svg:width="12.8cm" svg:height="10.55cm">
          <draw:text-box>
            <text:p text:style-name="PH2">Content + AI &amp; Integration Patterns</text:p>
            <text:p text:style-name="PBody">• Summarization / Translation</text:p>
            <text:p text:style-name="PBody">• Content generation / Search</text:p>
            <text:p text:style-name="PBody">• New accessibility improvements</text:p>
            <text:p text:style-name="PBody">• Speed of development</text:p>
          </draw:text-box>
        </draw:frame>
        <draw:frame draw:style-name="gr-body" presentation:class="outline" svg:x="14.2cm" svg:y="4.2cm" svg:width="12.8cm" svg:height="10.55cm">
          <draw:text-box>
            <text:p text:style-name="PBody">• External APIs for external data</text:p>
            <text:p text:style-name="PBody">• Choices of local models</text:p>
            <text:p text:style-name="PBody">• Hybrid systems</text:p>
            <text:p text:style-name="PBody">• Your Agentic CMS</text:p>
          </draw:text-box>
        </draw:frame>
      </draw:page>
      <draw:page draw:name="page9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The Risk: Proprietary Integration</text:p>
          </draw:text-box>
        </draw:frame>
        <draw:frame draw:style-name="gr-body" presentation:class="outline" svg:x="1cm" svg:y="4.2cm" svg:width="12.8cm" svg:height="10.55cm">
          <draw:text-box>
            <text:p text:style-name="PH2">Vendor-lock in with AI is riskier than just the code</text:p>
            <text:p text:style-name="PBody">• Single AI provider</text:p>
            <text:p text:style-name="PBody">• No abstraction layer</text:p>
            <text:p text:style-name="PBody">• No independent validation</text:p>
            <text:p text:style-name="PBody">• Clear lack of sovereignty</text:p>
          </draw:text-box>
        </draw:frame>
        <draw:frame draw:style-name="gr-body" presentation:class="outline" svg:x="14.2cm" svg:y="4.2cm" svg:width="12.8cm" svg:height="10.55cm">
          <draw:text-box>
            <text:p text:style-name="PBody">• Hard to switch when prices increase</text:p>
            <text:p text:style-name="PBody">• Difficult to audit between versions</text:p>
            <text:p text:style-name="PBody">• Just not yours to control</text:p>
            <text:p text:style-name="PBody">• Just like proprietary technology</text:p>
          </draw:text-box>
        </draw:frame>
      </draw:page>
      <draw:page draw:name="page10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Drupal Allows AI Flexibility</text:p>
          </draw:text-box>
        </draw:frame>
        <draw:frame draw:style-name="gr-body" presentation:class="outline" svg:x="1cm" svg:y="4.2cm" svg:width="12.8cm" svg:height="10.55cm">
          <draw:text-box>
            <text:p text:style-name="PH2">We should choose based on what allows us control</text:p>
            <text:p text:style-name="PBody">Models</text:p>
            <text:p text:style-name="PBody">• Large Language Models (LLMs)</text:p>
            <text:p text:style-name="PBody">• Small Language Models (SLMs)</text:p>
            <text:p text:style-name="PBody">• Proprietary or Open Source AI</text:p>
            <text:p text:style-name="PBody">• Training data &amp; weights</text:p>
          </draw:text-box>
        </draw:frame>
        <draw:frame draw:style-name="gr-body" presentation:class="outline" svg:x="14.2cm" svg:y="4.2cm" svg:width="12.8cm" svg:height="10.55cm">
          <draw:text-box>
            <text:p text:style-name="PBody">Deployment</text:p>
            <text:p text:style-name="PBody">• Cloud</text:p>
            <text:p text:style-name="PBody">• Local</text:p>
            <text:p text:style-name="PBody">• Hybrid</text:p>
            <text:p text:style-name="PBody">• Grid-aware</text:p>
          </draw:text-box>
        </draw:frame>
      </draw:page>
      <draw:page draw:name="page1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latforms == Constitutions</text:p>
          </draw:text-box>
        </draw:frame>
        <draw:frame draw:style-name="gr-body" presentation:class="outline" svg:x="1cm" svg:y="4.2cm" svg:width="12.8cm" svg:height="10.55cm">
          <draw:text-box>
            <text:p text:style-name="PH2">Systems we choose limit our choices &amp; are buttressed</text:p>
            <text:p text:style-name="PBody">• How digital tools are accessed</text:p>
            <text:p text:style-name="PBody">• What software can be used</text:p>
            <text:p text:style-name="PBody">• If we can share our work</text:p>
            <text:p text:style-name="PBody">• What can be known</text:p>
          </draw:text-box>
        </draw:frame>
        <draw:frame draw:style-name="gr-body" presentation:class="outline" svg:x="14.2cm" svg:y="4.2cm" svg:width="12.8cm" svg:height="10.55cm">
          <draw:text-box>
            <text:p text:style-name="PBody">• Intellectual Property</text:p>
            <text:p text:style-name="PBody">• Contract rights</text:p>
            <text:p text:style-name="PBody">• Silos of responsibility</text:p>
            <text:p text:style-name="PBody">• Code is law (governance)</text:p>
          </draw:text-box>
        </draw:frame>
      </draw:page>
      <draw:page draw:name="page1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Where Control Actually Resides</text:p>
          </draw:text-box>
        </draw:frame>
        <draw:frame draw:style-name="gr-body" presentation:class="outline" svg:x="1cm" svg:y="4.2cm" svg:width="12.8cm" svg:height="10.55cm">
          <draw:text-box>
            <text:p text:style-name="PBody">Most of the world is leasing the bulk of software from US owned companies</text:p>
            <text:p text:style-name="PBody">These companies own:</text:p>
            <text:p text:style-name="PBody">• Infrastructure</text:p>
            <text:p text:style-name="PBody">• Software</text:p>
            <text:p text:style-name="PBody">• Patents</text:p>
            <text:p text:style-name="PBody">• Roadmap</text:p>
          </draw:text-box>
        </draw:frame>
        <draw:frame draw:style-name="gr-body" presentation:class="outline" svg:x="14.2cm" svg:y="4.2cm" svg:width="12.8cm" svg:height="10.55cm">
          <draw:text-box>
            <text:p text:style-name="PBody">The governance of this software is almost entirely outside of Canada</text:p>
            <text:p text:style-name="PBody">The future will be controlled by those that own digital (including AI)</text:p>
          </draw:text-box>
        </draw:frame>
      </draw:page>
      <draw:page draw:name="page1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☹ Canada's Digital Sovereignty ☹</text:p>
          </draw:text-box>
        </draw:frame>
        <draw:frame draw:style-name="gr-body" presentation:class="outline" svg:x="1cm" svg:y="4.2cm" svg:width="12.8cm" svg:height="10.55cm">
          <draw:text-box>
            <text:p text:style-name="PH2">Canadian ventures with valuable IP don't stay that way</text:p>
            <text:p text:style-name="PBody">Today's focus</text:p>
            <text:p text:style-name="PBody">• Data sovereignty</text:p>
            <text:p text:style-name="PBody">• AI compute ownership</text:p>
          </draw:text-box>
        </draw:frame>
        <draw:frame draw:style-name="gr-body" presentation:class="outline" svg:x="14.2cm" svg:y="4.2cm" svg:width="12.8cm" svg:height="10.55cm">
          <draw:text-box>
            <text:p text:style-name="PBody">Missing</text:p>
            <text:p text:style-name="PBody">• Software control</text:p>
            <text:p text:style-name="PBody">• Platform control</text:p>
          </draw:text-box>
        </draw:frame>
      </draw:page>
      <draw:page draw:name="page1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mall Language Models (SLMs)</text:p>
          </draw:text-box>
        </draw:frame>
        <draw:frame draw:style-name="gr-body" presentation:class="outline" svg:x="1cm" svg:y="4.2cm" svg:width="12.8cm" svg:height="10.55cm">
          <draw:text-box>
            <text:p text:style-name="PH2">Open Source SLMs help innovation</text:p>
            <text:p text:style-name="PBody">• Domain-specific customization</text:p>
            <text:p text:style-name="PBody">• Lower cost maintenance</text:p>
            <text:p text:style-name="PBody">• Audit-ability</text:p>
            <text:p text:style-name="PBody">• Cross-training for models</text:p>
          </draw:text-box>
        </draw:frame>
        <draw:frame draw:style-name="gr-body" presentation:class="outline" svg:x="14.2cm" svg:y="4.2cm" svg:width="12.8cm" svg:height="10.55cm">
          <draw:text-box>
            <text:p text:style-name="PBody">• Local deployment</text:p>
            <text:p text:style-name="PBody">• Predictable outcomes</text:p>
            <text:p text:style-name="PBody">• Open source collaboration</text:p>
            <text:p text:style-name="PBody">• Ownership and knowledge will stay Canadian</text:p>
          </draw:text-box>
        </draw:frame>
      </draw:page>
      <draw:page draw:name="page1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Brussels, Berlin, Estonia, Oh My!</text:p>
          </draw:text-box>
        </draw:frame>
        <draw:frame draw:style-name="gr-body" presentation:class="outline" svg:x="1cm" svg:y="4.2cm" svg:width="26cm" svg:height="10.55cm">
          <draw:text-box>
            <text:p text:style-name="PH2">Open source events, Europe is happening!</text:p>
            <text:p text:style-name="PBody">• EU Open Source Week (FOSDEM)</text:p>
            <text:p text:style-name="PBody">• Germany's Sovereign Tech Agency</text:p>
            <text:p text:style-name="PBody">• EU Sovereign Tech Fund (proposal)</text:p>
            <text:p text:style-name="PBody">• EU is investing in open ecosystems</text:p>
          </draw:text-box>
        </draw:frame>
      </draw:page>
      <draw:page draw:name="page1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International Momentum</text:p>
          </draw:text-box>
        </draw:frame>
        <draw:frame draw:style-name="gr-body" presentation:class="outline" svg:x="1cm" svg:y="4.2cm" svg:width="12.8cm" svg:height="10.55cm">
          <draw:text-box>
            <text:p text:style-name="PH2">Europe is leading the way!</text:p>
            <text:p text:style-name="PBody">• European procurement reform</text:p>
            <text:p text:style-name="PBody">• Government Open Source Program Offices (OSPOs)</text:p>
            <text:p text:style-name="PBody">• Discussions in the European Parliament</text:p>
            <text:p text:style-name="PBody">• UN Open Source Week</text:p>
          </draw:text-box>
        </draw:frame>
        <draw:frame draw:style-name="gr-body" presentation:class="outline" svg:x="14.2cm" svg:y="4.2cm" svg:width="12.8cm" svg:height="10.55cm">
          <draw:text-box>
            <text:p text:style-name="PBody">Trends</text:p>
            <text:p text:style-name="PBody">• Dangers with US Technology</text:p>
            <text:p text:style-name="PBody">• Reducing dependency on US</text:p>
            <text:p text:style-name="PBody">• Increased domestic &amp; EU control</text:p>
          </draw:text-box>
        </draw:frame>
      </draw:page>
      <draw:page draw:name="page1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Germany’s ZenDiS: Beyond Funding</text:p>
          </draw:text-box>
        </draw:frame>
        <draw:frame draw:style-name="gr-body" presentation:class="outline" svg:x="1cm" svg:y="4.2cm" svg:width="12.8cm" svg:height="10.55cm">
          <draw:text-box>
            <text:p text:style-name="PH2">Digital Sovereignty as a Federal Mandate</text:p>
            <text:p text:style-name="PBody">• The Center for Digital Sovereignty</text:p>
            <text:p text:style-name="PBody">• Wholly-owned federal agency (ZenDiS)</text:p>
            <text:p text:style-name="PBody">• Managing the openDesk suite</text:p>
            <text:p text:style-name="PBody">• Goal: Total exit from MS 365/Google</text:p>
          </draw:text-box>
        </draw:frame>
        <draw:frame draw:style-name="gr-body" presentation:class="outline" svg:x="14.2cm" svg:y="4.2cm" svg:width="12.8cm" svg:height="10.55cm">
          <draw:text-box>
            <text:p text:style-name="PBody">• Open CoDE Repository</text:p>
            <text:p text:style-name="PBody">• Single source for all public code</text:p>
            <text:p text:style-name="PBody">• Taxpayer funded = Taxpayer owned</text:p>
            <text:p text:style-name="PBody">• Standardizing OSS procurement</text:p>
            <text:p text:style-name="PBody">Sovereignty isn't a checkbox; it’s a dedicated institutional capacity.</text:p>
          </draw:text-box>
        </draw:frame>
      </draw:page>
      <draw:page draw:name="page18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The EU AI Act &amp; Audit-ability</text:p>
          </draw:text-box>
        </draw:frame>
        <draw:frame draw:style-name="gr-body" presentation:class="outline" svg:x="1cm" svg:y="4.2cm" svg:width="12.8cm" svg:height="10.55cm">
          <draw:text-box>
            <text:p text:style-name="PH2">The "Brussels Effect" is (hopefully) coming to Canada</text:p>
            <text:p text:style-name="PBody">• The Right to Know</text:p>
            <text:p text:style-name="PBody">• Mandatory audits for "High Risk" AI</text:p>
            <text:p text:style-name="PBody">• Requires transparency of training data</text:p>
            <text:p text:style-name="PBody">• Explicit protections for OSS developers</text:p>
          </draw:text-box>
        </draw:frame>
        <draw:frame draw:style-name="gr-body" presentation:class="outline" svg:x="14.2cm" svg:y="4.2cm" svg:width="12.8cm" svg:height="10.55cm">
          <draw:text-box>
            <text:p text:style-name="PBody">• Mirroring EU's risk-based approach</text:p>
            <text:p text:style-name="PBody">• You cannot audit a "Black Box"</text:p>
            <text:p text:style-name="PBody">• Proprietary AI = Unverifiable Government</text:p>
            <text:p text:style-name="PBody">• Is it acting on our best interest?</text:p>
            <text:p text:style-name="PBody">If we cannot peek inside the model, should we deploy it?</text:p>
          </draw:text-box>
        </draw:frame>
      </draw:page>
      <draw:page draw:name="page19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anada: Builders or Tenants?</text:p>
          </draw:text-box>
        </draw:frame>
        <draw:frame draw:style-name="gr-body" presentation:class="outline" svg:x="1cm" svg:y="4.2cm" svg:width="12.8cm" svg:height="10.55cm">
          <draw:text-box>
            <text:p text:style-name="PH2">Escaping the "Branch Plant" Digital Economy</text:p>
            <text:p text:style-name="PBody">• The "Tenant" Risk</text:p>
            <text:p text:style-name="PBody">• Relying on US-SaaS exports data</text:p>
            <text:p text:style-name="PBody">• No control over the roadmap</text:p>
            <text:p text:style-name="PBody">• Profits leave the country</text:p>
          </draw:text-box>
        </draw:frame>
        <draw:frame draw:style-name="gr-body" presentation:class="outline" svg:x="14.2cm" svg:y="4.2cm" svg:width="12.8cm" svg:height="10.55cm">
          <draw:text-box>
            <text:p text:style-name="PBody">• The "Builder" Opportunity</text:p>
            <text:p text:style-name="PBody">• Drupal keeps IP in Canada</text:p>
            <text:p text:style-name="PBody">• Local agencies = Local experts</text:p>
            <text:p text:style-name="PBody">• Procurement as Industrial Policy</text:p>
            <text:p text:style-name="PBody">Europe is investing in "Strategic Autonomy." Why is Canada still paying rent?</text:p>
          </draw:text-box>
        </draw:frame>
      </draw:page>
      <draw:page draw:name="page20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Open Source as Public Infrastructure</text:p>
          </draw:text-box>
        </draw:frame>
        <draw:frame draw:style-name="gr-body" presentation:class="outline" svg:x="1cm" svg:y="4.2cm" svg:width="12.8cm" svg:height="10.55cm">
          <draw:text-box>
            <text:p text:style-name="PH2">Common public investments are like roads</text:p>
            <text:p text:style-name="PBody">• Must be maintained</text:p>
            <text:p text:style-name="PBody">• Must be inspectable</text:p>
            <text:p text:style-name="PBody">• Must be shared</text:p>
            <text:p text:style-name="PBody">• We all depend on them</text:p>
          </draw:text-box>
        </draw:frame>
        <draw:frame draw:style-name="gr-body" presentation:class="outline" svg:x="14.2cm" svg:y="4.2cm" svg:width="12.8cm" svg:height="10.55cm">
          <draw:text-box>
            <text:p text:style-name="PBody">• Transparency</text:p>
            <text:p text:style-name="PBody">• Better government services</text:p>
            <text:p text:style-name="PBody">• Opportunities for entrepreneurs</text:p>
            <text:p text:style-name="PBody">• Economic growth</text:p>
            <text:p text:style-name="PBody">• Greater security</text:p>
          </draw:text-box>
        </draw:frame>
      </draw:page>
      <draw:page draw:name="page2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mall Business Matters</text:p>
          </draw:text-box>
        </draw:frame>
        <draw:frame draw:style-name="gr-body" presentation:class="outline" svg:x="1cm" svg:y="4.2cm" svg:width="26cm" svg:height="10.55cm">
          <draw:text-box>
            <text:p text:style-name="PH2">Small businesses drive Drupal's development</text:p>
            <text:p text:style-name="PBody">• Drive innovation</text:p>
            <text:p text:style-name="PBody">• Reduce concentration risk</text:p>
            <text:p text:style-name="PBody">• Enable competition</text:p>
            <text:p text:style-name="PBody">• Employ a lot of Canadians</text:p>
            <text:p text:style-name="PBody">• Support the local economy &amp; tax base</text:p>
            <text:p text:style-name="PBody">They are often excluded from most government procurement</text:p>
          </draw:text-box>
        </draw:frame>
      </draw:page>
      <draw:page draw:name="page2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all to Action</text:p>
          </draw:text-box>
        </draw:frame>
        <draw:frame draw:style-name="gr-body" presentation:class="outline" svg:x="1cm" svg:y="4.2cm" svg:width="26cm" svg:height="10.55cm">
          <draw:text-box>
            <text:p text:style-name="PH2">If you cannot replace it, you cannot control it</text:p>
            <text:p text:style-name="PBody">• Think of Drupal as infrastructure</text:p>
            <text:p text:style-name="PBody">• Look for new places for open source</text:p>
            <text:p text:style-name="PBody">• Resist and unsubscribe, Scott Galloway</text:p>
            <text:p text:style-name="PBody">• Talking to your representatives</text:p>
            <text:p text:style-name="PBody">• Public Money, Public Code</text:p>
          </draw:text-box>
        </draw:frame>
      </draw:page>
      <draw:page draw:name="page2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What are you building today that you may not control tomorrow?</text:p>
            <text:p text:style-name="PMeta">Website: ox.ca</text:p>
            <text:p text:style-name="PMeta">Social: Mastodon @mgifford@mastodon.social; Bluesky @ox.ca</text:p>
            <text:p text:style-name="PMeta">Slides: ox.ca/p/5</text:p>
          </draw:text-box>
        </draw:frame>
      </draw:page>
      <draw:page draw:name="page2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lide 24</text:p>
          </draw:text-box>
        </draw:frame>
        <draw:frame draw:style-name="gr-body" presentation:class="outline" svg:x="1cm" svg:y="4.2cm" svg:width="26cm" svg:height="10.55cm">
          <draw:text-box>
            <text:p text:style-name="PBody">[Image: Thank Sponsors]</text:p>
            <text:p text:style-name="PBody">---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Code as Constitution: Building Public Digital Infrastructure We Can Actually Trust</dc:title>
    <meta:generator>Markdown Slides Editor</meta:generator>
  </office:meta>
</office:document-meta>
</file>